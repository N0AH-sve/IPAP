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70000044385FC9A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907cm" svg:x="1cm" svg:y="6.896cm">
          <draw:image xlink:href="Pictures/10000001000005170000044385FC9A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9:01:00.729328932</dc:date>
    <meta:editing-duration>PT13M16S</meta:editing-duration>
    <meta:editing-cycles>3</meta:editing-cycles>
    <meta:generator>LibreOffice/24.2.7.2$Linux_X86_64 LibreOffice_project/420$Build-2</meta:generator>
    <meta:document-statistic meta:object-count="1"/>
  </office:meta>
</office:document-meta>
</file>